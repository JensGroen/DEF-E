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language="en" fo:country="NL"/>
    </style:style>
    <style:style style:name="P3" style:parent-style-name="Normal" style:family="paragraph">
      <style:text-properties fo:language="en" fo:country="NL"/>
    </style:style>
    <style:style style:name="T4" style:parent-style-name="DefaultParagraphFont" style:family="text">
      <style:text-properties fo:font-weight="bold" style:font-weight-asian="bold" style:font-weight-complex="bold" fo:language="en" fo:country="NL"/>
    </style:style>
    <style:style style:name="T5" style:parent-style-name="DefaultParagraphFont" style:family="text">
      <style:text-properties fo:language="en" fo:country="NL"/>
    </style:style>
    <style:style style:name="P6" style:parent-style-name="Normal" style:list-style-name="LFO1" style:family="paragraph">
      <style:text-properties fo:language="en" fo:country="NL"/>
    </style:style>
    <style:style style:name="P7" style:parent-style-name="Normal" style:list-style-name="LFO1" style:family="paragraph">
      <style:text-properties fo:language="en" fo:country="NL"/>
    </style:style>
    <style:style style:name="P8" style:parent-style-name="Normal" style:list-style-name="LFO1" style:family="paragraph">
      <style:text-properties fo:language="en" fo:country="NL"/>
    </style:style>
    <style:style style:name="P9" style:parent-style-name="Normal" style:family="paragraph">
      <style:text-properties fo:language="en" fo:country="NL"/>
    </style:style>
    <style:style style:name="P10" style:parent-style-name="Normal" style:family="paragraph">
      <style:text-properties fo:language="en" fo:country="NL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Leerdoel Design – Jens Groen</text:span></text:p>
      <text:p text:style-name="P3">Ik heb een magnetenhouder ontworpen waarin de magneten in een Halbach-array zijn geplaatst.</text:p>
      <text:p text:style-name="Normal"><text:span text:style-name="T4">Criteria</text:span><text:span text:style-name="T5"><text:s/>Het ontwerp moet voldoen aan de volgende eisen:</text:span></text:p>
      <text:list text:style-name="LFO1" text:continue-numbering="true">
        <text:list-item>
          <text:p text:style-name="P6">De oriëntatie van elke magneet moet correct zijn volgens de Halbach-configuratie, waarbij elke magneet een rotatie heeft van p·θ ten opzichte van de radiale richting.</text:p>
        </text:list-item>
        <text:list-item>
          <text:p text:style-name="P7">Het model moet parametrisch zijn: zowel het aantal magneten (N) als de draaisnelheid van de magnetisatie (p) moeten instelbaar zijn.</text:p>
        </text:list-item>
        <text:list-item>
          <text:p text:style-name="P8">De afmetingen van de cilinders moeten overeenkomen met de werkelijke magneten, gedefinieerd door de straal rmag en de halve hoogte hmag.</text:p>
        </text:list-item>
      </text:list>
      <text:p text:style-name="P9"/>
      <text:p text:style-name="P10">De code genereert dit model:</text:p>
      <text:p text:style-name="Normal"><draw:frame draw:style-name="a0" draw:name="Picture 2" text:anchor-type="as-char" svg:x="0in" svg:y="0in" svg:width="3.74378in" svg:height="2.21435in" style:rel-width="scale" style:rel-height="scale"><draw:image xlink:href="media/image1.png" xlink:type="simple" xlink:show="embed" xlink:actuate="onLoad"/><svg:title/><svg:desc/></draw:frame></text:p>
      <text:p text:style-name="Normal">Uiteindelijke model:</text:p>
      <text:p text:style-name="Normal"><draw:frame draw:style-name="a1" draw:name="Picture 1" text:anchor-type="as-char" svg:x="0in" svg:y="0in" svg:width="3.75198in" svg:height="2.2192in" style:rel-width="scale" style:rel-height="scale"><draw:image xlink:href="media/image2.png" xlink:type="simple" xlink:show="embed" xlink:actuate="onLoad"/><svg:title/><svg:desc/></draw:frame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nl" fo:country="NL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ens Groen</meta:initial-creator>
    <dc:creator>Jens Groen</dc:creator>
    <meta:creation-date>2026-05-20T15:25:00Z</meta:creation-date>
    <dc:date>2026-05-20T15:45:00Z</dc:date>
    <meta:template xlink:href="Normal" xlink:type="simple"/>
    <meta:editing-cycles>1</meta:editing-cycles>
    <meta:editing-duration>PT1200S</meta:editing-duration>
    <meta:document-statistic meta:page-count="1" meta:paragraph-count="1" meta:word-count="100" meta:character-count="670" meta:row-count="4" meta:non-whitespace-character-count="571"/>
  </office:meta>
</office:document-meta>
</file>